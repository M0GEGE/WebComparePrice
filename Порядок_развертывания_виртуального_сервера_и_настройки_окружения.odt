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6000002F52E5D03A3.png" manifest:media-type="image/png"/>
  <manifest:file-entry manifest:full-path="Pictures/10000001000002AA000001C7F034C586.png" manifest:media-type="image/png"/>
  <manifest:file-entry manifest:full-path="Pictures/100000010000044E000001E8667B2C9D.png" manifest:media-type="image/png"/>
  <manifest:file-entry manifest:full-path="Pictures/1000000100000447000001B1FF5023B8.png" manifest:media-type="image/png"/>
  <manifest:file-entry manifest:full-path="Pictures/10000001000004150000010E814DCC12.png" manifest:media-type="image/png"/>
  <manifest:file-entry manifest:full-path="Pictures/100000010000037C0000015E5AAC9EF5.png" manifest:media-type="image/png"/>
  <manifest:file-entry manifest:full-path="Pictures/10000001000002FC0000018C2F60D1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d44c" officeooo:paragraph-rsid="0000d44c"/>
    </style:style>
    <style:style style:name="P2" style:family="paragraph" style:parent-style-name="Standard">
      <style:text-properties fo:language="en" fo:country="US" officeooo:rsid="0000d44c" officeooo:paragraph-rsid="00011882"/>
    </style:style>
    <style:style style:name="P3" style:family="paragraph" style:parent-style-name="Standard">
      <style:text-properties fo:language="en" fo:country="US" officeooo:rsid="00011882" officeooo:paragraph-rsid="00011882"/>
    </style:style>
    <style:style style:name="P4" style:family="paragraph" style:parent-style-name="Standard">
      <style:text-properties style:font-name="Courier New" fo:font-size="10pt" fo:language="en" fo:country="US" officeooo:rsid="0000d44c" officeooo:paragraph-rsid="0000d44c" style:font-size-asian="10pt" style:font-size-complex="10pt"/>
    </style:style>
    <style:style style:name="P5" style:family="paragraph" style:parent-style-name="Standard">
      <style:text-properties fo:language="en" fo:country="US" officeooo:rsid="0001b52f" officeooo:paragraph-rsid="0001b52f"/>
    </style:style>
    <style:style style:name="P6" style:family="paragraph" style:parent-style-name="Standard">
      <style:text-properties fo:language="en" fo:country="US" officeooo:rsid="0000d44c" officeooo:paragraph-rsid="0001b52f"/>
    </style:style>
    <style:style style:name="P7" style:family="paragraph" style:parent-style-name="Standard">
      <style:text-properties style:font-name="Courier New" fo:font-size="10pt" fo:language="en" fo:country="US" officeooo:rsid="0000d44c" officeooo:paragraph-rsid="0003e386" style:font-size-asian="10pt" style:font-size-complex="10pt"/>
    </style:style>
    <style:style style:name="P8" style:family="paragraph" style:parent-style-name="Standard">
      <style:text-properties style:font-name="Courier New" fo:font-size="10pt" fo:language="en" fo:country="US" officeooo:rsid="0001b52f" officeooo:paragraph-rsid="0003e386" style:font-size-asian="10pt" style:font-size-complex="10pt"/>
    </style:style>
    <style:style style:name="P9" style:family="paragraph" style:parent-style-name="Standard">
      <style:text-properties style:font-name="Courier New" fo:font-size="10pt" fo:language="en" fo:country="US" officeooo:rsid="0001b52f" officeooo:paragraph-rsid="0001b52f" style:font-size-asian="10pt" style:font-size-complex="10pt"/>
    </style:style>
    <style:style style:name="P10" style:family="paragraph" style:parent-style-name="Standard">
      <style:text-properties fo:language="en" fo:country="US" officeooo:rsid="0002cbcb" officeooo:paragraph-rsid="0002cbcb"/>
    </style:style>
    <style:style style:name="P11" style:family="paragraph" style:parent-style-name="Standard">
      <style:text-properties style:font-name="Courier New" fo:font-size="10pt" fo:language="en" fo:country="US" officeooo:rsid="0002cbcb" officeooo:paragraph-rsid="0002cbcb" style:font-size-asian="10pt" style:font-size-complex="10pt"/>
    </style:style>
    <style:style style:name="P12" style:family="paragraph" style:parent-style-name="Standard">
      <style:text-properties style:font-name="Courier New" fo:font-size="9pt" fo:language="en" fo:country="US" officeooo:rsid="0002cbcb" officeooo:paragraph-rsid="0002cbcb" style:font-size-asian="9pt" style:font-size-complex="9pt"/>
    </style:style>
    <style:style style:name="P13" style:family="paragraph" style:parent-style-name="Standard">
      <style:text-properties style:font-name="Courier New" fo:font-size="10pt" fo:language="en" fo:country="US" officeooo:rsid="0002cbcb" officeooo:paragraph-rsid="0003e386" style:font-size-asian="10pt" style:font-size-complex="10pt"/>
    </style:style>
    <style:style style:name="T1" style:family="text">
      <style:text-properties officeooo:rsid="00011882"/>
    </style:style>
    <style:style style:name="T2" style:family="text">
      <style:text-properties officeooo:rsid="0001b52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анавливаем сервер</text:p>
      <text:p text:style-name="P1"><draw:frame draw:style-name="fr1" draw:name="Изображение1" text:anchor-type="char" svg:width="17cm" svg:height="8.811cm" draw:z-index="0"><draw:image xlink:href="Pictures/10000001000002FC0000018C2F60D1CD.png" xlink:type="simple" xlink:show="embed" xlink:actuate="onLoad" draw:mime-type="image/png"/></draw:frame><text:s/></text:p>
      <text:p text:style-name="P1">Оставляем английский язык</text:p>
      <text:p text:style-name="P1"><draw:frame draw:style-name="fr1" draw:name="Изображение2" text:anchor-type="char" svg:width="17cm" svg:height="6.669cm" draw:z-index="1"><draw:image xlink:href="Pictures/100000010000037C0000015E5AAC9EF5.png" xlink:type="simple" xlink:show="embed" xlink:actuate="onLoad" draw:mime-type="image/png"/></draw:frame><text:s/></text:p>
      <text:p text:style-name="P1">Настройки ввода</text:p>
      <text:p text:style-name="P1"><draw:frame draw:style-name="fr1" draw:name="Изображение3" text:anchor-type="char" svg:width="17cm" svg:height="4.39cm" draw:z-index="2"><draw:image xlink:href="Pictures/10000001000004150000010E814DCC12.png" xlink:type="simple" xlink:show="embed" xlink:actuate="onLoad" draw:mime-type="image/png"/></draw:frame><text:s/></text:p>
      <text:p text:style-name="P1">Базовая установка</text:p>
      <text:p text:style-name="P1"><draw:frame draw:style-name="fr2" draw:name="Изображение4" text:anchor-type="char" svg:width="17cm" svg:height="6.722cm" draw:z-index="3"><draw:image xlink:href="Pictures/1000000100000447000001B1FF5023B8.png" xlink:type="simple" xlink:show="embed" xlink:actuate="onLoad" draw:mime-type="image/png"/></draw:frame><text:soft-page-break/><text:s/></text:p>
      <text:p text:style-name="P1">Разметка диска по умолчанию без виртуальной группы</text:p>
      <text:p text:style-name="P1"><draw:frame draw:style-name="fr2" draw:name="Изображение5" text:anchor-type="char" svg:width="17cm" svg:height="7.527cm" draw:z-index="4"><draw:image xlink:href="Pictures/100000010000044E000001E8667B2C9D.png" xlink:type="simple" xlink:show="embed" xlink:actuate="onLoad" draw:mime-type="image/png"/></draw:frame><text:s/><draw:frame draw:style-name="fr2" draw:name="Изображение6" text:anchor-type="char" svg:width="17cm" svg:height="11.34cm" draw:z-index="6"><draw:image xlink:href="Pictures/10000001000002AA000001C7F034C586.png" xlink:type="simple" xlink:show="embed" xlink:actuate="onLoad" draw:mime-type="image/png"/></draw:frame></text:p>
      <text:p text:style-name="P1">Продолжаем</text:p>
      <text:p text:style-name="P2">Финиш установки</text:p>
      <text:p text:style-name="P1"><draw:frame draw:style-name="fr2" draw:name="Изображение7" text:anchor-type="char" svg:width="17cm" svg:height="18.981cm" draw:z-index="5"><draw:image xlink:href="Pictures/10000001000002A6000002F52E5D03A3.png" xlink:type="simple" xlink:show="embed" xlink:actuate="onLoad" draw:mime-type="image/png"/></draw:frame><text:soft-page-break/></text:p>
      <text:p text:style-name="P1"/>
      <text:p text:style-name="P1"/>
      <text:p text:style-name="P3">Устанавливаем MC для быстрой навигации в графической оболочке</text:p>
      <text:p text:style-name="P3">~$ sudo apt install mc</text:p>
      <text:p text:style-name="P3"/>
      <text:p text:style-name="P3">Устанавливаем mysql сервер в качестве СУБД</text:p>
      <text:p text:style-name="P3">~$ sudo apt install mysql-server</text:p>
      <text:p text:style-name="P3"/>
      <text:p text:style-name="P3">Удаляем демонстрационные настройки и свободный доступ без паролей</text:p>
      <text:p text:style-name="P3">~$ sudo mysql_secure_installation</text:p>
      <text:p text:style-name="P3"/>
      <text:p text:style-name="P3">Проверяем статус СУБД</text:p>
      <text:p text:style-name="P1"><text:soft-page-break/>~$ sudo systemctl status mysql</text:p>
      <text:p text:style-name="P4">● mysql.service - MySQL Community Server</text:p>
      <text:p text:style-name="P4"><text:s text:c="5"/>Loaded: loaded (/lib/systemd/system/mysql.service; enabled; vendor preset: enabled)</text:p>
      <text:p text:style-name="P4"><text:s text:c="5"/>Active: active (running) since Wed 2026-06-2<text:span text:style-name="T1">2</text:span> 12:16:53 UTC; 1min 0s ago</text:p>
      <text:p text:style-name="P4"><text:s text:c="4"/>Process: 2929 ExecStartPre=/usr/share/mysql/mysql-systemd-start pre (code=exited, status=0/SUCCESS)</text:p>
      <text:p text:style-name="P4"><text:s text:c="3"/>Main PID: 2937 (mysqld)</text:p>
      <text:p text:style-name="P4"><text:s text:c="5"/>Status: "Server is operational"</text:p>
      <text:p text:style-name="P4"><text:s text:c="6"/>Tasks: 39 (limit: 6922)</text:p>
      <text:p text:style-name="P4"><text:s text:c="5"/>Memory: 365.0M</text:p>
      <text:p text:style-name="P4"><text:s text:c="8"/>CPU: 788ms</text:p>
      <text:p text:style-name="P4"><text:s text:c="5"/>CGroup: /system.slice/mysql.service</text:p>
      <text:p text:style-name="P4"><text:s text:c="13"/>└─2937 /usr/sbin/mysqld</text:p>
      <text:p text:style-name="P1"/>
      <text:p text:style-name="P5">Входим в mysql, чтобы создать отдельного пользователя goods</text:p>
      <text:p text:style-name="P6">~$ sudo <text:span text:style-name="T2">mysql</text:span></text:p>
      <text:p text:style-name="P6"/>
      <text:p text:style-name="P7"><text:span text:style-name="T2">mysql&gt; </text:span>CREATE USER 'goods'@'localhost' IDENTIFIED BY '<text:span text:style-name="T2">*****</text:span>';</text:p>
      <text:p text:style-name="P7"><text:span text:style-name="T2">mysql&gt; </text:span>GRANT ALL PRIVILEGES ON *.* TO 'goods'@'localhost' WITH GRANT OPTION;</text:p>
      <text:p text:style-name="P7"><text:span text:style-name="T2">mysql&gt; </text:span>FLUSH PRIVILEGES;</text:p>
      <text:p text:style-name="P8">mysql&gt; exit;</text:p>
      <text:p text:style-name="P5"/>
      <text:p text:style-name="P5">Создадим базу данных</text:p>
      <text:p text:style-name="P5">~$ mysql -u goods -p</text:p>
      <text:p text:style-name="P9">mysql&gt; CREATE DATABASE `compare_all` /*!40100 DEFAULT CHARACTER SET utf8mb4 COLLATE utf8mb4_general_ci */ /*!80016 DEFAULT ENCRYPTION='N' */;</text:p>
      <text:p text:style-name="P9">Query OK, 1 row affected (0.00 sec)</text:p>
      <text:p text:style-name="P5"></text:p>
      <text:p text:style-name="P5">Переключаемся на нее</text:p>
      <text:p text:style-name="P9">mysql&gt; use compare_all</text:p>
      <text:p text:style-name="P9">Database changed</text:p>
      <text:p text:style-name="P5"></text:p>
      <text:p text:style-name="P5">Создаем таблицу для проекта</text:p>
      <text:p text:style-name="P9">mysql&gt; CREATE TABLE `products` (</text:p>
      <text:p text:style-name="P9"><text:s text:c="4"/>-&gt; <text:s text:c="2"/>`id` bigint unsigned NOT NULL AUTO_INCREMENT COMMENT 'id',</text:p>
      <text:p text:style-name="P9"><text:s text:c="4"/>-&gt; <text:s text:c="2"/>`name` varchar(256) COLLATE utf8mb4_general_ci NOT NULL COMMENT 'Наименование',</text:p>
      <text:p text:style-name="P9"><text:s text:c="4"/>-&gt; <text:s text:c="2"/>`price` float DEFAULT NULL COMMENT 'прайс',</text:p>
      <text:p text:style-name="P9"><text:s text:c="4"/>-&gt; <text:s text:c="2"/>PRIMARY KEY (`id`),</text:p>
      <text:p text:style-name="P9"><text:s text:c="4"/>-&gt; <text:s text:c="2"/>UNIQUE KEY `id` (`id`)</text:p>
      <text:p text:style-name="P9"><text:s text:c="4"/>-&gt; ) ENGINE=InnoDB AUTO_INCREMENT=3 DEFAULT CHARSET=utf8mb4 COLLATE=utf8mb4_general_ci;</text:p>
      <text:p text:style-name="P9">Query OK, 0 rows affected (0.01 sec)</text:p>
      <text:p text:style-name="P5"></text:p>
      <text:p text:style-name="P5">Выходим</text:p>
      <text:p text:style-name="P9">mysql&gt;exit;</text:p>
      <text:p text:style-name="P5"/>
      <text:p text:style-name="P10">Устанавливаем nginx</text:p>
      <text:p text:style-name="P10">~$ sudo apt install nginx</text:p>
      <text:p text:style-name="P10"></text:p>
      <text:p text:style-name="P10">Проверяем</text:p>
      <text:p text:style-name="P10">~$ service nginx status</text:p>
      <text:p text:style-name="P11">● nginx.service - A high performance web server and a reverse proxy server</text:p>
      <text:p text:style-name="P11"><text:s text:c="5"/>Loaded: loaded (/lib/systemd/system/nginx.service; enabled; vendor preset: enabled)</text:p>
      <text:p text:style-name="P11"><text:s text:c="5"/>Active: active (running) since Wed 2026-06-22 12:41:28 UTC; 1min 20s ago</text:p>
      <text:p text:style-name="P11"><text:s text:c="7"/>Docs: man:nginx(8)</text:p>
      <text:p text:style-name="P11"><text:soft-page-break/><text:s text:c="4"/>Process: 1557 ExecStartPre=/usr/sbin/nginx -t -q -g daemon on; master_process on; (code=exited, status=0/SUCCESS)</text:p>
      <text:p text:style-name="P11"><text:s text:c="4"/>Process: 1558 ExecStart=/usr/sbin/nginx -g daemon on; master_process on; (code=exited, status=0/SUCCESS)</text:p>
      <text:p text:style-name="P11"><text:s text:c="3"/>Main PID: 1652 (nginx)</text:p>
      <text:p text:style-name="P11"><text:s text:c="6"/>Tasks: 3 (limit: 6922)</text:p>
      <text:p text:style-name="P11"><text:s text:c="5"/>Memory: 4.7M</text:p>
      <text:p text:style-name="P11"><text:s text:c="8"/>CPU: 20ms</text:p>
      <text:p text:style-name="P11"><text:s text:c="5"/>CGroup: /system.slice/nginx.service</text:p>
      <text:p text:style-name="P11"><text:s text:c="13"/>├─1652 "nginx: master process /usr/sbin/nginx -g daemon on; master_process on;"</text:p>
      <text:p text:style-name="P11"><text:s text:c="13"/>├─1655 "nginx: worker process" "" "" "" "" "" "" "" "" "" "" "" "" "" "" "" "" "" "" "" "" "" "" "" "" "" "" ""</text:p>
      <text:p text:style-name="P11"><text:s text:c="13"/>└─1656 "nginx: worker process" "" "" "" "" "" "" "" "" "" "" "" "" "" "" "" "" "" "" "" "" "" "" "" "" "" "" ""</text:p>
      <text:p text:style-name="P10"></text:p>
      <text:p text:style-name="P10"></text:p>
      <text:p text:style-name="P10">Установка Node.js</text:p>
      <text:p text:style-name="P10"></text:p>
      <text:p text:style-name="P10">~$ curl -fsSL https://deb.nodesource.com/setup_22.x | sudo -E bash -</text:p>
      <text:p text:style-name="P10">~$ sudo apt-get install -y nodejs</text:p>
      <text:p text:style-name="P10"></text:p>
      <text:p text:style-name="P10">Проверяем</text:p>
      <text:p text:style-name="P10">$ npm -v</text:p>
      <text:p text:style-name="P10">10.9.8</text:p>
      <text:p text:style-name="P10">~$ node -v</text:p>
      <text:p text:style-name="P10">v22.23.0</text:p>
      <text:p text:style-name="P10"></text:p>
      <text:p text:style-name="P10">Устанавливаем pm2 для старта nodejs приложения как сервиса</text:p>
      <text:p text:style-name="P10">~$ sudo npm install pm2 -g</text:p>
      <text:p text:style-name="P10"></text:p>
      <text:p text:style-name="P10">Проверяем</text:p>
      <text:p text:style-name="P10">~$ pm2 list</text:p>
      <text:p text:style-name="P10">(Краткий вывод)</text:p>
      <text:p text:style-name="P11">[PM2] Spawning PM2 daemon with pm2_home=/home/kseniya/.pm2</text:p>
      <text:p text:style-name="P11">[PM2] PM2 Successfully daemonized</text:p>
      <text:p text:style-name="P10"></text:p>
      <text:p text:style-name="P10">Переходим в папку /var/www/goods и клонируем проект (git установлен сразу из коробки дистрибутива ubuntu server)</text:p>
      <text:p text:style-name="P10">~$ git clone https://github.com/M0GEGE/WebComparePrice.git</text:p>
      <text:p text:style-name="P10"></text:p>
      <text:p text:style-name="P10">Изменяем в файлах pages/<text:span text:style-name="T3">script.js</text:span> и server/<text:span text:style-name="T3">database.js</text:span> данные для подключения:</text:p>
      <text:p text:style-name="P10">database.js - логин и пароль к БД, </text:p>
      <text:p text:style-name="P10">script.js - const API_BASE = 'https://goods.cyber-orpheus.su/';</text:p>
      <text:p text:style-name="P10"></text:p>
      <text:p text:style-name="P10">Переходим в папку /var/www/goods/WebComparePrice и проверяем запуск приложения</text:p>
      <text:p text:style-name="P10">~$ npm run dev</text:p>
      <text:p text:style-name="P10"></text:p>
      <text:p text:style-name="P11">&gt; webcompareprice@1.0.0 dev</text:p>
      <text:p text:style-name="P11">&gt; node server/server.js</text:p>
      <text:p text:style-name="P10"><text:span text:style-name="T4"/></text:p>
      <text:p text:style-name="P11">Server started on port 3000</text:p>
      <text:p text:style-name="P11">MySQL подключен</text:p>
      <text:p text:style-name="P10"></text:p>
      <text:p text:style-name="P10">Добавляем сервис как демон </text:p>
      <text:p text:style-name="P10">/var/www/goods/WebComparePrice$ pm2 start npm --name "goods-compare-app-dev" -- run dev</text:p>
      <text:p text:style-name="P10"><text:soft-page-break/>[PM2] Starting /usr/bin/npm in fork_mode (1 instance)</text:p>
      <text:p text:style-name="P10">[PM2] Done.</text:p>
      <text:p text:style-name="P12">┌────┬────────────────────┬──────────┬──────┬───────────┬──────────┬──────────┐</text:p>
      <text:p text:style-name="P12">│ id │ name <text:s text:c="14"/>│ mode <text:s text:c="4"/>│ ↺ <text:s text:c="3"/>│ status <text:s text:c="3"/>│ cpu <text:s text:c="5"/>│ memory <text:s text:c="2"/>│</text:p>
      <text:p text:style-name="P12">├────┼────────────────────┼──────────┼──────┼───────────┼──────────┼──────────┤</text:p>
      <text:p text:style-name="P12">│ 0 <text:s/>│ goods-compare-app… │ fork <text:s text:c="4"/>│ 0 <text:s text:c="3"/>│ online <text:s text:c="3"/>│ 0% <text:s text:c="6"/>│ 32.6mb <text:s text:c="2"/>│</text:p>
      <text:p text:style-name="P12">└────┴────────────────────┴──────────┴──────┴───────────┴──────────┴──────────┘</text:p>
      <text:p text:style-name="P10"></text:p>
      <text:p text:style-name="P10">Конфигурируем nginx, добавляем базовую конфигурацию в файл</text:p>
      <text:p text:style-name="P10">goods.cyber-orpheus.su</text:p>
      <text:p text:style-name="P11">server {</text:p>
      <text:p text:style-name="P11"><text:s text:c="4"/>listen 80;</text:p>
      <text:p text:style-name="P11"><text:s text:c="4"/>listen [::]:80;</text:p>
      <text:p text:style-name="P11"></text:p>
      <text:p text:style-name="P11"><text:s text:c="4"/>server_name goods.cyber-orpheus.su;</text:p>
      <text:p text:style-name="P11"><text:s text:c="4"/># Специальный блок для проверок Certbot (Let's Encrypt)</text:p>
      <text:p text:style-name="P11"><text:s text:c="4"/>location /.well-known/acme-challenge/ {</text:p>
      <text:p text:style-name="P11"><text:s text:c="8"/>root /var/www/html;</text:p>
      <text:p text:style-name="P11"><text:s text:c="8"/>allow all;</text:p>
      <text:p text:style-name="P11"><text:s text:c="4"/>}</text:p>
      <text:p text:style-name="P11"></text:p>
      <text:p text:style-name="P11"><text:s text:c="4"/>location / {</text:p>
      <text:p text:style-name="P11"><text:s text:c="8"/>proxy_pass http://127.0.0.1:3000;</text:p>
      <text:p text:style-name="P11"><text:s text:c="8"/></text:p>
      <text:p text:style-name="P11"><text:s text:c="8"/># Передача правильных заголовков клиенту</text:p>
      <text:p text:style-name="P11"><text:s text:c="8"/>proxy_http_version 1.1;</text:p>
      <text:p text:style-name="P11"><text:s text:c="8"/>proxy_set_header Upgrade $http_upgrade;</text:p>
      <text:p text:style-name="P11"><text:s text:c="8"/>proxy_set_header Connection 'upgrade';</text:p>
      <text:p text:style-name="P11"><text:s text:c="8"/>proxy_set_header Host $host;</text:p>
      <text:p text:style-name="P11"><text:s text:c="8"/>proxy_set_header X-Real-IP $remote_addr;</text:p>
      <text:p text:style-name="P11"><text:s text:c="8"/>proxy_set_header X-Forwarded-For $proxy_add_x_forwarded_for;</text:p>
      <text:p text:style-name="P11"><text:s text:c="8"/>proxy_set_header X-Forwarded-Proto $scheme;</text:p>
      <text:p text:style-name="P11"><text:s text:c="8"/></text:p>
      <text:p text:style-name="P11"><text:s text:c="8"/># Настройки таймаутов (полезно для долгих Node.js запросов)</text:p>
      <text:p text:style-name="P11"><text:s text:c="8"/>proxy_read_timeout 90;</text:p>
      <text:p text:style-name="P11"><text:s text:c="8"/>proxy_connect_timeout 90;</text:p>
      <text:p text:style-name="P11"><text:s text:c="4"/>}</text:p>
      <text:p text:style-name="P11"></text:p>
      <text:p text:style-name="P11"><text:s text:c="4"/># Логи для удобного дебага</text:p>
      <text:p text:style-name="P11"><text:s text:c="4"/>access_log /var/log/nginx/goods.cyber-orpheus.su.access.log;</text:p>
      <text:p text:style-name="P11"><text:s text:c="4"/>error_log /var/log/nginx/goods.cyber-orpheus.su.error.log;</text:p>
      <text:p text:style-name="P11">}</text:p>
      <text:p text:style-name="P10"></text:p>
      <text:p text:style-name="P10">Проверяем корректность конфига</text:p>
      <text:p text:style-name="P10">~# sudo nginx -t</text:p>
      <text:p text:style-name="P11">nginx: the configuration file /etc/nginx/nginx.conf syntax is ok</text:p>
      <text:p text:style-name="P11">nginx: configuration file /etc/nginx/nginx.conf test is successful</text:p>
      <text:p text:style-name="P10"></text:p>
      <text:p text:style-name="P10">Копируем конфиг в активные сайты</text:p>
      <text:p text:style-name="P10">~# sudo ln -s /etc/nginx/sites-available/goods.cyber-orpheus.su /etc/nginx/sites-enabled/</text:p>
      <text:p text:style-name="P10"></text:p>
      <text:p text:style-name="P10">Устанавливаем certbot для получения сертификата для сайта</text:p>
      <text:p text:style-name="P10">~# sudo apt install certbot python3-certbot-nginx</text:p>
      <text:p text:style-name="P10"></text:p>
      <text:p text:style-name="P10">Создаем папку, чтобы certbot мог выполнить верификацию сайта, данная папка указывается в конфиге сервера, который привели выше.</text:p>
      <text:p text:style-name="P10">Данное действие выполняется по той причине, что <text:s/>наше приложение, которое запускается через nodejs, не имеет прямых статических путей, а certbot необходимо положить в папку файл верификации</text:p>
      <text:p text:style-name="P10">~# sudo mkdir -p /var/www/html/.well-known/acme-challenge</text:p>
      <text:p text:style-name="P10"><text:soft-page-break/></text:p>
      <text:p text:style-name="P10">Запускаем получение сертификата</text:p>
      <text:p text:style-name="P10">~# sudo certbot --nginx -d goods.cyber-orpheus.su</text:p>
      <text:p text:style-name="P10"></text:p>
      <text:p text:style-name="P10">После окончания работы certbot конфиг goods.cyber-orpheus.su стал выглядеть следующим образом:</text:p>
      <text:p text:style-name="P10"></text:p>
      <text:p text:style-name="P11">server {</text:p>
      <text:p text:style-name="P11"></text:p>
      <text:p text:style-name="P11"><text:s text:c="4"/>server_name goods.cyber-orpheus.su;</text:p>
      <text:p text:style-name="P11"><text:s text:c="4"/># Специальный блок для проверок Certbot (Let's Encrypt)</text:p>
      <text:p text:style-name="P11"><text:s text:c="4"/>location /.well-known/acme-challenge/ {</text:p>
      <text:p text:style-name="P11"><text:s text:c="8"/>root /var/www/html;</text:p>
      <text:p text:style-name="P11"><text:s text:c="8"/>allow all;</text:p>
      <text:p text:style-name="P11"><text:s text:c="4"/>}</text:p>
      <text:p text:style-name="P11"><text:s text:c="4"/></text:p>
      <text:p text:style-name="P11"></text:p>
      <text:p text:style-name="P11"><text:s text:c="4"/>location / {</text:p>
      <text:p text:style-name="P11"><text:s text:c="8"/>proxy_pass http://127.0.0.1:3000;</text:p>
      <text:p text:style-name="P11"><text:s text:c="8"/></text:p>
      <text:p text:style-name="P11"><text:s text:c="8"/># Передача правильных заголовков клиенту</text:p>
      <text:p text:style-name="P11"><text:s text:c="8"/>proxy_http_version 1.1;</text:p>
      <text:p text:style-name="P11"><text:s text:c="8"/>proxy_set_header Upgrade $http_upgrade;</text:p>
      <text:p text:style-name="P11"><text:s text:c="8"/>proxy_set_header Connection 'upgrade';</text:p>
      <text:p text:style-name="P11"><text:s text:c="8"/>proxy_set_header Host $host;</text:p>
      <text:p text:style-name="P11"><text:s text:c="8"/>proxy_set_header X-Real-IP $remote_addr;</text:p>
      <text:p text:style-name="P11"><text:s text:c="8"/>proxy_set_header X-Forwarded-For $proxy_add_x_forwarded_for;</text:p>
      <text:p text:style-name="P11"><text:s text:c="8"/>proxy_set_header X-Forwarded-Proto $scheme;</text:p>
      <text:p text:style-name="P11"><text:s text:c="8"/></text:p>
      <text:p text:style-name="P11"><text:s text:c="8"/># Настройки таймаутов (полезно для долгих Node.js запросов)</text:p>
      <text:p text:style-name="P11"><text:s text:c="8"/>proxy_read_timeout 90;</text:p>
      <text:p text:style-name="P11"><text:s text:c="8"/>proxy_connect_timeout 90;</text:p>
      <text:p text:style-name="P11"><text:s text:c="4"/>}</text:p>
      <text:p text:style-name="P11"></text:p>
      <text:p text:style-name="P11"><text:s text:c="4"/># Логи для удобного дебага</text:p>
      <text:p text:style-name="P11"><text:s text:c="4"/>access_log /var/log/nginx/goods.cyber-orpheus.su.access.log;</text:p>
      <text:p text:style-name="P11"><text:s text:c="4"/>error_log /var/log/nginx/goods.cyber-orpheus.su.error.log;</text:p>
      <text:p text:style-name="P11"></text:p>
      <text:p text:style-name="P11"><text:s text:c="4"/>listen [::]:443 ssl; # managed by Certbot</text:p>
      <text:p text:style-name="P11"><text:s text:c="4"/>listen 443 ssl; # managed by Certbot</text:p>
      <text:p text:style-name="P11"><text:s text:c="4"/>ssl_certificate /etc/letsencrypt/live/goods.cyber-orpheus.su/fullchain.pem; # managed by Certbot</text:p>
      <text:p text:style-name="P11"><text:s text:c="4"/>ssl_certificate_key /etc/letsencrypt/live/goods.cyber-orpheus.su/privkey.pem; # managed by Certbot</text:p>
      <text:p text:style-name="P11"><text:s text:c="4"/>include /etc/letsencrypt/options-ssl-nginx.conf; # managed by Certbot</text:p>
      <text:p text:style-name="P11"><text:s text:c="4"/>ssl_dhparam /etc/letsencrypt/ssl-dhparams.pem; # managed by Certbot</text:p>
      <text:p text:style-name="P11"></text:p>
      <text:p text:style-name="P11">}</text:p>
      <text:p text:style-name="P11">server {</text:p>
      <text:p text:style-name="P11"><text:s text:c="4"/>if ($host = goods.cyber-orpheus.su) {</text:p>
      <text:p text:style-name="P11"><text:s text:c="8"/>return 301 https://$host$request_uri;</text:p>
      <text:p text:style-name="P11"><text:s text:c="4"/>} # managed by Certbot</text:p>
      <text:p text:style-name="P11"></text:p>
      <text:p text:style-name="P11"></text:p>
      <text:p text:style-name="P11"><text:s text:c="4"/>listen 80;</text:p>
      <text:p text:style-name="P11"><text:s text:c="4"/>listen [::]:80;</text:p>
      <text:p text:style-name="P11"></text:p>
      <text:p text:style-name="P11"><text:s text:c="4"/>server_name goods.cyber-orpheus.su;</text:p>
      <text:p text:style-name="P11"><text:s text:c="4"/>return 404; # managed by Certbot</text:p>
      <text:p text:style-name="P11">}</text:p>
      <text:p text:style-name="P10"></text:p>
      <text:p text:style-name="P10">Проверяем конфиг и перезапускаем nginx</text:p>
      <text:p text:style-name="P10"><text:soft-page-break/>~# sudo nginx -t</text:p>
      <text:p text:style-name="P13">nginx: the configuration file /etc/nginx/nginx.conf syntax is ok</text:p>
      <text:p text:style-name="P13">nginx: configuration file /etc/nginx/nginx.conf test is successful</text:p>
      <text:p text:style-name="P10">~# sudo systemctl restart nginx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5:00:29.795057397</meta:creation-date>
    <dc:date>2026-06-24T16:51:50.817078268</dc:date>
    <meta:editing-duration>PT45M58S</meta:editing-duration>
    <meta:editing-cycles>1</meta:editing-cycles>
    <meta:document-statistic meta:table-count="0" meta:image-count="7" meta:object-count="0" meta:page-count="8" meta:paragraph-count="237" meta:word-count="942" meta:character-count="8484" meta:non-whitespace-character-count="6900"/>
    <meta:generator>LibreOffice/25.8.2.2$Linux_X86_64 LibreOffice_project/d401f2107ccab8f924a8e2df40f573aab7605b6f</meta:generator>
  </office:meta>
</office:document-meta>
</file>